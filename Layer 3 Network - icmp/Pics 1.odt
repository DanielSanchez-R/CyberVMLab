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900000263717E48D18B9FA621.png" manifest:media-type="image/png"/>
  <manifest:file-entry manifest:full-path="Pictures/10000001000002DB0000026A31C18E957A280AF4.png" manifest:media-type="image/png"/>
  <manifest:file-entry manifest:full-path="Pictures/100000010000045900000263C0C42451D12B05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ad5c" officeooo:paragraph-rsid="000bad5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2" draw:name="Image2" text:anchor-type="char" svg:x="-0.0626in" svg:y="5.8957in" svg:width="6.9252in" svg:height="3.8016in" draw:z-index="1"><draw:image xlink:href="Pictures/100000010000045900000263C0C42451D12B059D.png" xlink:type="simple" xlink:show="embed" xlink:actuate="onLoad" draw:mime-type="image/png"/></draw:frame><draw:frame draw:style-name="fr3" draw:name="Image1" text:anchor-type="char" svg:width="6.9252in" svg:height="5.8543in" draw:z-index="0"><draw:image xlink:href="Pictures/10000001000002DB0000026A31C18E957A280AF4.png" xlink:type="simple" xlink:show="embed" xlink:actuate="onLoad" draw:mime-type="image/png"/></draw:frame></text:p>
      <text:p text:style-name="P1"><draw:frame draw:style-name="fr1" draw:name="Image3" text:anchor-type="char" svg:width="6.9252in" svg:height="3.8016in" draw:z-index="2"><draw:image xlink:href="Pictures/100000010000045900000263717E48D18B9FA62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7T18:43:32.957440691</meta:creation-date>
    <dc:date>2026-07-07T18:48:32.048150471</dc:date>
    <meta:editing-duration>PT4M59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0" meta:word-count="0" meta:character-count="0" meta:non-whitespace-character-count="0"/>
  </office:meta>
</office:document-meta>
</file>